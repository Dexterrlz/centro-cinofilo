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d00" style:font-weight-asian="bold" style:font-weight-complex="bold"/>
    </style:style>
    <style:style style:name="T3" style:family="text">
      <style:text-properties officeooo:rsid="001782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Gli istruttori e le loro discipline</text:span></text:p>
      <text:p text:style-name="Text_20_body">Ogni istruttore gestisce le proprie discipline in modo indipendente:</text:p>
      <text:list text:style-name="L1">
        <text:list-item>
          <text:p text:style-name="P1"><text:span text:style-name="Strong_20_Emphasis">Angelo</text:span> → Agility e Swim Dog Sport </text:p>
        </text:list-item>
        <text:list-item>
          <text:p text:style-name="P1"><text:span text:style-name="Strong_20_Emphasis">Connie</text:span> → Agility </text:p>
        </text:list-item>
        <text:list-item>
          <text:p text:style-name="P1"><text:span text:style-name="Strong_20_Emphasis">Santa</text:span> → Educazione di Base, Hoopers e Rally Obedience </text:p>
        </text:list-item>
        <text:list-item>
          <text:p text:style-name="P2"><text:span text:style-name="Strong_20_Emphasis">Simona</text:span> → Educazione di Base e Nosework </text:p>
        </text:list-item>
      </text:list>
      <text:p text:style-name="Text_20_body">I clienti di Angelo per l'Agility e i clienti di Connie per l'Agility sono separati — ognuno ha il suo istruttore di riferimento e prenota solo con lui.</text:p>
      <text:p text:style-name="Horizontal_20_Line"/>
      <text:p text:style-name="Text_20_body"><text:span text:style-name="Strong_20_Emphasis">Come si prenota un utente</text:span></text:p>
      <text:list text:style-name="L2">
        <text:list-item>
          <text:p text:style-name="P3">L'utente entra nella piattaforma e fa il login </text:p>
        </text:list-item>
        <text:list-item>
          <text:p text:style-name="P3">Sceglie il suo istruttore di riferimento </text:p>
        </text:list-item>
        <text:list-item>
          <text:p text:style-name="P3">Sceglie la disciplina che vuole fare con quell'istruttore </text:p>
        </text:list-item>
        <text:list-item>
          <text:p text:style-name="P3">Vede il calendario con i giorni e gli orari disponibili </text:p>
        </text:list-item>
        <text:list-item>
          <text:p text:style-name="P4">Prenota la sua lezione </text:p>
        </text:list-item>
      </text:list>
      <text:p text:style-name="Horizontal_20_Line"/>
      <text:p text:style-name="Text_20_body"><text:span text:style-name="Strong_20_Emphasis">I pacchetti lezioni</text:span></text:p>
      <text:p text:style-name="Text_20_body">Ogni disciplina ha un pacchetto di lezioni prepagato:</text:p>
      <text:list text:style-name="L3">
        <text:list-item>
          <text:p text:style-name="P5"><text:span text:style-name="Strong_20_Emphasis">Agility</text:span> (Angelo e Connie) → pacchetto da<text:span text:style-name="T1"> </text:span><text:span text:style-name="T2">8</text:span><text:span text:style-name="Strong_20_Emphasis"><text:span text:style-name="T1"> </text:span></text:span><text:span text:style-name="Strong_20_Emphasis">lezioni</text:span> </text:p>
        </text:list-item>
        <text:list-item>
          <text:p text:style-name="P6"><text:span text:style-name="Strong_20_Emphasis">Tutte le altre discipline</text:span> → pacchetto da <text:span text:style-name="Strong_20_Emphasis">8 lezioni</text:span> </text:p>
        </text:list-item>
      </text:list>
      <text:p text:style-name="Text_20_body">Quando un utente esaurisce le lezioni del suo pacchetto, non può più prenotare quella disciplina finché non paga il pacchetto successivo. Il pagamento avviene sempre di persona o tramite bonifico — non online. Una volta ricevuto il pagamento, uno di voi sblocca manualmente l'utente dalla piattaforma e riparte con un nuovo pacchetto.</text:p>
      <text:p text:style-name="Text_20_body">Se un utente fa sia Agility con Angelo che Nosework con Simona, i due pacchetti sono completamente separati: se esaurisce l'Agility, può ancora prenotare il Nosework senza problemi.</text:p>
      <text:p text:style-name="Horizontal_20_Line"/>
      <text:p text:style-name="Text_20_body"><text:span text:style-name="Strong_20_Emphasis">Quando si può prenotare e cancellare</text:span></text:p>
      <text:list text:style-name="L4">
        <text:list-item>
          <text:p text:style-name="P7">Si può prenotare una lezione <text:span text:style-name="Strong_20_Emphasis">fino a 12 ore prima</text:span> dell'inizio (es. se la lezione è alle 18:00 di oggi, si può prenotare fino alle 6:00 di questa mattina) </text:p>
        </text:list-item>
        <text:list-item>
          <text:p text:style-name="P8">Si può cancellare una lezione <text:span text:style-name="Strong_20_Emphasis">fino a 24 ore prima</text:span> dell'inizio. Dopo quella soglia la lezione non è più cancellabile </text:p>
        </text:list-item>
      </text:list>
      <text:p text:style-name="Horizontal_20_Line"/>
      <text:p text:style-name="Text_20_body"><text:span text:style-name="Strong_20_Emphasis">Quante lezioni si possono prenotare alla volta</text:span></text:p>
      <text:p text:style-name="Text_20_body">Il calendario mostra sempre <text:span text:style-name="Strong_20_Emphasis">le prossime 2 settimane</text:span> (dalla settimana corrente a quella successiva). Ogni utente può prenotare <text:span text:style-name="Strong_20_Emphasis">massimo 2 lezioni a settimana</text:span> per ogni disciplina.</text:p>
      <text:p text:style-name="Text_20_body">Ogni sabato a mezzanotte si apre automaticamente una nuova settimana per tutti — nessuno ha vantaggi rispetto agli altri, tutti vedono le stesse date nello stesso momento.</text:p>
      <text:p text:style-name="Text_20_body"><text:soft-page-break/>Esempio pratico: se oggi è lunedì 1 giugno, vedi disponibilità fino al 14 giugno e puoi prenotare al massimo 2 lezioni nella settimana 1-7 e altre 2 lezioni nella settimana 8-14. Sabato 6 giugno a mezzanotte si apre la settimana 15-21 giugno per tutti.</text:p>
      <text:p text:style-name="Horizontal_20_Line"/>
      <text:p text:style-name="Text_20_body"><text:span text:style-name="Strong_20_Emphasis">Come funziona il contatore lezioni</text:span></text:p>
      <text:p text:style-name="Text_20_body">Sia voi istruttori dall'area admin che l'utente dal suo profilo potete vedere in qualsiasi momento:</text:p>
      <text:list text:style-name="L5">
        <text:list-item>
          <text:p text:style-name="P9">Quante lezioni ha già fatto in questo pacchetto </text:p>
        </text:list-item>
        <text:list-item>
          <text:p text:style-name="P10">Quante gliene rimangono prima del rinnovo </text:p>
        </text:list-item>
      </text:list>
      <text:p text:style-name="Text_20_body">Questo vi permette di sapere sempre a che punto è ogni allievo senza dover tenere traccia a mano.</text:p>
      <text:p text:style-name="Horizontal_20_Line"/>
      <text:p text:style-name="Text_20_body"><text:span text:style-name="Strong_20_Emphasis">La durata delle lezioni</text:span></text:p>
      <text:p text:style-name="Text_20_body">Gli orari sul calendario si generano automaticamente in base alla disciplina:</text:p>
      <text:list text:style-name="L6">
        <text:list-item>
          <text:p text:style-name="P11"><text:span text:style-name="Strong_20_Emphasis">30 minuti</text:span> → Agility, Hoopers, Rally Obedience, Nosework </text:p>
        </text:list-item>
        <text:list-item>
          <text:p text:style-name="P11"><text:span text:style-name="Strong_20_Emphasis">40 minuti</text:span> → Swim Dog Sport (mattina) </text:p>
        </text:list-item>
        <text:list-item>
          <text:p text:style-name="P12"><text:span text:style-name="Strong_20_Emphasis">60 minuti</text:span> → Educazione di Base </text:p>
        </text:list-item>
      </text:list>
      <text:p text:style-name="Text_20_body">Gli slot si generano da soli, non dovete inserirli uno per uno — voi configurate solo i giorni disponibili e l'orario di inizio e fine, il sistema fa il resto.</text:p>
      <text:p text:style-name="Horizontal_20_Line"/>
      <text:p text:style-name="Text_20_body"><text:span text:style-name="Strong_20_Emphasis">Cosa possono fare gli istruttori dal pannello admin</text:span></text:p>
      <text:p text:style-name="Text_20_body">Ognuno di voi avrà le proprie credenziali di accesso (non dovete aspettare che qualcuno faccia il logout per entrare). Dal pannello potete tutti:</text:p>
      <text:list text:style-name="L7">
        <text:list-item>
          <text:p text:style-name="P13">Vedere tutte le prenotazioni </text:p>
        </text:list-item>
        <text:list-item>
          <text:p text:style-name="P13">Segnare una lezione come svolta (questo scala il contatore del pacchetto) </text:p>
        </text:list-item>
        <text:list-item>
          <text:p text:style-name="P13">Sbloccare un utente dopo il pagamento del nuovo pacchetto </text:p>
        </text:list-item>
        <text:list-item>
          <text:p text:style-name="P13">Impostare i giorni e gli orari disponibili per le vostre discipline </text:p>
        </text:list-item>
        <text:list-item>
          <text:p text:style-name="P13">Chiudere temporaneamente una disciplina (es. se un istruttore è malato) </text:p>
        </text:list-item>
        <text:list-item>
          <text:p text:style-name="P13">Aprire e chiudere le discipline stagionali (es. Swim Dog Sport solo d'estate) </text:p>
        </text:list-item>
        <text:list-item>
          <text:p text:style-name="P14">Bloccare tutte le prenotazioni per le ferie (es. dal 22 dicembre al 3 gennaio) </text:p>
        </text:list-item>
      </text:list>
      <text:p text:style-name="Text_20_body">Una cosa che non si può fare dal pannello è cambiare la durata delle lezioni — quella è fissa per ogni disciplina e non si tocca, per evitare errori.</text:p>
      <text:p text:style-name="Horizontal_20_Line"/>
      <text:p text:style-name="Text_20_body"><text:span text:style-name="Strong_20_Emphasis">Cosa rimane fuori dalla piattaforma per ora</text:span></text:p>
      <text:p text:style-name="Text_20_body">Per mantenere il sistema semplice e funzionale, queste cose vengono gestite esternamente:</text:p>
      <text:list text:style-name="L8">
        <text:list-item>
          <text:p text:style-name="P15">La lezione di prova gratuita (la organizzate direttamente voi) </text:p>
        </text:list-item>
        <text:list-item>
          <text:p text:style-name="P15">I pagamenti (sempre di persona o bonifico) </text:p>
        </text:list-item>
        <text:list-item>
          <text:p text:style-name="P15">I reminder via WhatsApp <text:span text:style-name="T3">e Email</text:span>(valutiamo in futuro) </text:p>
        </text:list-item>
        <text:list-item>
          <text:p text:style-name="P16">Lo sgambo (da definire insie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11:14:24.650972000</meta:creation-date>
    <dc:date>2026-06-24T16:50:23.433390300</dc:date>
    <meta:editing-duration>PT5H35M58S</meta:editing-duration>
    <meta:editing-cycles>2</meta:editing-cycles>
    <meta:generator>LibreOffice/25.8.7.3$Windows_X86_64 LibreOffice_project/30742500f2d3eb4366ac312fa33d3dcabdb3eba5</meta:generator>
    <meta:print-date>2026-06-24T11:26:17.505551800</meta:print-date>
    <meta:printed-by>File PDF</meta:printed-by>
    <meta:document-statistic meta:table-count="0" meta:image-count="0" meta:object-count="0" meta:page-count="2" meta:paragraph-count="53" meta:word-count="699" meta:character-count="4149" meta:non-whitespace-character-count="3499"/>
  </office:meta>
</office:document-meta>
</file>